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2.2626in"/>
    </style:style>
    <style:style style:name="co3" style:family="table-column">
      <style:table-column-properties fo:break-before="auto" style:column-width="5.5445in"/>
    </style:style>
    <style:style style:name="co4" style:family="table-column">
      <style:table-column-properties fo:break-before="auto" style:column-width="8.4508in"/>
    </style:style>
    <style:style style:name="co5" style:family="table-column">
      <style:table-column-properties fo:break-before="auto" style:column-width="0.8791in"/>
    </style:style>
    <style:style style:name="co6" style:family="table-column">
      <style:table-column-properties fo:break-before="auto" style:column-width="3.1665in"/>
    </style:style>
    <style:style style:name="co7" style:family="table-column">
      <style:table-column-properties fo:break-before="auto" style:column-width="4.7217in"/>
    </style:style>
    <style:style style:name="co8" style:family="table-column">
      <style:table-column-properties fo:break-before="auto" style:column-width="3.0701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item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8"/>
        <table:table-column table:style-name="co6"/>
        <table:table-column table:style-name="co7"/>
        <table:table-column table:style-name="co8"/>
        <table:table-column table:style-name="co9" table:number-columns-repeated="16376"/>
        <table:table-row table:style-name="ro1">
          <table:table-cell table:style-name="ce1" office:value-type="string" calcext:value-type="string">
            <text:p>RESREF</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Notes on appearance</text:p>
          </table:table-cell>
          <table:table-cell table:style-name="ce7" office:value-type="string" calcext:value-type="string">
            <text:p>Icon?</text:p>
          </table:table-cell>
          <table:table-cell table:style-name="ce1" table:number-columns-repeated="16379"/>
        </table:table-row>
        <table:table-row table:style-name="ro1">
          <table:table-cell office:value-type="string" calcext:value-type="string">
            <text:p>mh#amul1</text:p>
          </table:table-cell>
          <table:table-cell office:value-type="string" calcext:value-type="string">
            <text:p>Amulet against Undead</text:p>
          </table:table-cell>
          <table:table-cell office:value-type="string" calcext:value-type="string">
            <text:p>As long as the dead have been walking the land of the living, the clergy of all good deities have been creating enchanted items to help destroy these foul abominations. <text:s/>This particular amulet was created by the clergy of Lathander to aid a brave adventurer willing to take the fight to these cursed foes of all lif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2</text:p>
          </table:table-cell>
          <table:table-cell office:value-type="string" calcext:value-type="string">
            <text:p>Necklace of Prayer Beads</text:p>
          </table:table-cell>
          <table:table-cell office:value-type="string" calcext:value-type="string">
            <text:p>Attached to this enchanted necklace are several large gems with holy scriptures engraved in them. <text:s/>Those versed in religion can use these to cast some beneficial spells a few times per da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3</text:p>
          </table:table-cell>
          <table:table-cell office:value-type="string" calcext:value-type="string">
            <text:p>Gem of Insight</text:p>
          </table:table-cell>
          <table:table-cell office:value-type="string" calcext:value-type="string">
            <text:p>The enchanted gem on this pendant bestows an unusual sharpness of wit and clarity of mind upon the wearer. <text:s/>It can also be used to raise the wearer's intelligence permanently, but in this case the gem and the wisdom it bestows will be lost forev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4</text:p>
          </table:table-cell>
          <table:table-cell office:value-type="string" calcext:value-type="string">
            <text:p>Mirror Amulet</text:p>
          </table:table-cell>
          <table:table-cell office:value-type="string" calcext:value-type="string">
            <text:p>This amulet consists of a single large sapphire on a silver chain. <text:s/>As you gaze into the stone, you see your own face reflected multiple times in the stone's many facets. <text:s/>This amulet defies exact identification, either it is so old that current day divination magic does not work on it, or the original creator is someone who values their privacy. <text:s/>The subtle, elegant design hints on an elven origin though.</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5</text:p>
          </table:table-cell>
          <table:table-cell office:value-type="string" calcext:value-type="string">
            <text:p>Brooch of Shielding</text:p>
          </table:table-cell>
          <table:table-cell office:value-type="string" calcext:value-type="string">
            <text:p>This enchanted brooch has but one purpose, to harmlessly absorb the projectiles of the Magic Missile spell and similar effec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6</text:p>
          </table:table-cell>
          <table:table-cell office:value-type="string" calcext:value-type="string">
            <text:p>Scarab versus Golems</text:p>
          </table:table-cell>
          <table:table-cell office:value-type="string" calcext:value-type="string">
            <text:p>Sometimes scathingly called the "Amulet of Tomb Robbers" by the clergy of Mulhorand, this enchanted jewel is a boon for those who expect to counter golems of any type. <text:s/>Powerful wizards often employ these mindless but strong servants, making this necklace a favorite item among adventurers as well.</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7</text:p>
          </table:table-cell>
          <table:table-cell office:value-type="string" calcext:value-type="string">
            <text:p>Medallion of the Arctic</text:p>
          </table:table-cell>
          <table:table-cell office:value-type="string" calcext:value-type="string">
            <text:p>This strange medallion is decorated with an engraving of a beautiful woman with her arms outstretched at her sides, snow piled in each hand. <text:s/>A bear stands in profile behind h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8</text:p>
          </table:table-cell>
          <table:table-cell office:value-type="string" calcext:value-type="string">
            <text:p>Medallion of Faith</text:p>
          </table:table-cell>
          <table:table-cell office:value-type="string" calcext:value-type="string">
            <text:p>When worn by a devout priest or paladin of good alignment, this medallion shows the holy symbol of their chosen patron and enables them to cast several useful spells. <text:s/>To anyone else it is merely a pretty baubl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9</text:p>
          </table:table-cell>
          <table:table-cell office:value-type="string" calcext:value-type="string">
            <text:p>Amulet of the Sacred Fist</text:p>
          </table:table-cell>
          <table:table-cell office:value-type="string" calcext:value-type="string">
            <text:p>This magical amulet has an eastern design and likely hails from far away Shou-Lung or Kara-Tur. <text:s/>Nobody seems to know who enchanted it, when, or why. <text:s/>But it is a great boon to any martial artist, providing them with a "third eye" to help avoid the worst of sneak attacks and critical hi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and1</text:p>
          </table:table-cell>
          <table:table-cell office:value-type="string" calcext:value-type="string">
            <text:p>Circlet of the Wilderness</text:p>
          </table:table-cell>
          <table:table-cell office:value-type="string" calcext:value-type="string">
            <text:p>Magical circlets like this one are the creation of The Simbul, ruler of Aglarond, and given to rangers as a reward for exceptional service. <text:s/>To see one of these so far from Aglarond is quite rare indeed.</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band2</text:p>
          </table:table-cell>
          <table:table-cell office:value-type="string" calcext:value-type="string">
            <text:p>Improved Circlet of the Wilderness</text:p>
          </table:table-cell>
          <table:table-cell office:value-type="string" calcext:value-type="string">
            <text:p>Magical circlets like this one are the creation of The Simbul, ruler of Aglarond, and given to rangers as a reward for exceptional service. <text:s/>To see one of these so far from Aglarond is quite rare indeed.</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band3</text:p>
          </table:table-cell>
          <table:table-cell office:value-type="string" calcext:value-type="string">
            <text:p>Ultimate Circlet of the Wilderness</text:p>
          </table:table-cell>
          <table:table-cell office:value-type="string" calcext:value-type="string">
            <text:p>Magical circlets like this one are the creation of The Simbul, ruler of Aglarond, and given to rangers as a reward for exceptional service. <text:s/>To see one of these so far from Aglarond is quite rare indeed.</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belt1</text:p>
          </table:table-cell>
          <table:table-cell office:value-type="string" calcext:value-type="string">
            <text:p>Girdle of Dwarvenkind</text:p>
          </table:table-cell>
          <table:table-cell office:value-type="string" calcext:value-type="string">
            <text:p>Dwarven priests of Moradin sometimes fashion these belts to bestow upon a non-dwarf who has done the clan a great service. <text:s/>In addition to making the wearer an honorary clans-member, the girdle has a number of beneficial effec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2</text:p>
          </table:table-cell>
          <table:table-cell office:value-type="string" calcext:value-type="string">
            <text:p>Sunite Sash</text:p>
          </table:table-cell>
          <table:table-cell office:value-type="string" calcext:value-type="string">
            <text:p>This beautiful scarlet sash has been woven from fine red thread and delicate gold wire. <text:s/>Priests of Sune sometimes create these enchanted sashes as a gift to a loved on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3</text:p>
          </table:table-cell>
          <table:table-cell office:value-type="string" calcext:value-type="string">
            <text:p>Storm's Garter</text:p>
          </table:table-cell>
          <table:table-cell office:value-type="string" calcext:value-type="string">
            <text:p>This enchanted black silken sash was designed by Storm Silverhand, one of the Seven Sisters, but she has shared the secret of making then with other members of the Harpers. <text:s/>As such, items bearing this title are common among their members and are worn by both genders. <tex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4</text:p>
          </table:table-cell>
          <table:table-cell office:value-type="string" calcext:value-type="string">
            <text:p>Girdle of Many Pouches</text:p>
          </table:table-cell>
          <table:table-cell office:value-type="string" calcext:value-type="string">
            <text:p>This broad waistbelt seems to be nothing more than a well-made article of dress. <text:s/>But on closer inspection it has many small hidden pouches that act like tiny bags of holding, making it ideal for storing and quickly accessing spell components. <text:s/>This helps both mages and priests with casting their spells a little quick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5</text:p>
          </table:table-cell>
          <table:table-cell office:value-type="string" calcext:value-type="string">
            <text:p>Adriyana's Garter</text:p>
          </table:table-cell>
          <table:table-cell office:value-type="string" calcext:value-type="string">
            <text:p>The mundane appearance of this simple black leather thigh-band belies its great power. <text:s/>Adriyana Voudsarr "Leaf in the Wind" was a humble mage who was granted the title of Magister by Azuth in 278. <text:s/>She was not interested in mage duels, but challengers kept coming to her anyway, trying to prove themselves more worthy of the titl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6</text:p>
          </table:table-cell>
          <table:table-cell office:value-type="string" calcext:value-type="string">
            <text:p>Girdle of Cloud Giant Strength</text:p>
          </table:table-cell>
          <table:table-cell office:value-type="string" calcext:value-type="string">
            <text:p>This mighty enchanted belt grants the wearer the equivalent strength of a cloud giant. <text:s/>It was once the property of the paladin Hardan of Waterdeep, who brought it back from an expedition into the Undermountain. <text:s/>Hardan himself disappeared during the second Dragonspear war, and is assumed to have been dragged into hell by the devils like so many othe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7</text:p>
          </table:table-cell>
          <table:table-cell office:value-type="string" calcext:value-type="string">
            <text:p>Girdle of Storm Giant Strength</text:p>
          </table:table-cell>
          <table:table-cell office:value-type="string" calcext:value-type="string">
            <text:p>This incredibly powerful belt grants the wearer the immense strength of a storm giant, the physically strongest mortal beings to walk Faerun except for dragons. <text:s/>Exactly who made it and why is not known, but some suspect the touch of the divine in it. <text:s/>This is further supported by its tendency to show up whenever there is an event of divine significance playing out, only to mysteriously disappear soon afterward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oot1</text:p>
          </table:table-cell>
          <table:table-cell office:value-type="string" calcext:value-type="string">
            <text:p>Boots of the Master Ninja</text:p>
          </table:table-cell>
          <table:table-cell office:value-type="string" calcext:value-type="string">
            <text:p>These enchanted boots are more properly known as 'feather tabi' in their country of origin, faraway Kara-Tur. <text:s/>Even in that mystical land they are rare enough, the secrets of their creation only known to few. <text:s/>For even one pair to show up at the Sword Coast is a truly exceptional situati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oot2</text:p>
          </table:table-cell>
          <table:table-cell office:value-type="string" calcext:value-type="string">
            <text:p>Boots of Striding and Springing</text:p>
          </table:table-cell>
          <table:table-cell office:value-type="string" calcext:value-type="string">
            <text:p>The wearer of these enchanted boots becomes exceptionally light on &lt;PRO_HISHER&gt; feet and can easily make spectacular leaps in all directions. <text:s/>In addition to an improved movement rate, this makes &lt;PRO_HIMHER&gt; harder to hit in comba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oot3</text:p>
          </table:table-cell>
          <table:table-cell office:value-type="string" calcext:value-type="string">
            <text:p>Boots of Balance</text:p>
          </table:table-cell>
          <table:table-cell office:value-type="string" calcext:value-type="string">
            <text:p>The wearer of these soft, low-heeled supple leather boots is endowed with a magically enhanced sense of balance. <text:s/>Although popular with rogues, they can be worn by any clas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1</text:p>
          </table:table-cell>
          <table:table-cell office:value-type="string" calcext:value-type="string">
            <text:p>Vambraces of Evil's Warding</text:p>
          </table:table-cell>
          <table:table-cell office:value-type="string" calcext:value-type="string">
            <text:p>Legend has it that these bracers were forged on mount Celestia itself and given to the first champion of good, aeons ago. <text:s/>Whether that is true remains to be seen, but the glowing blue celestial runes do suggest a divine origin of some sort. <text:s/>Countless of mortal champions have worn these bracers in the everlasting battle against evil.</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2</text:p>
          </table:table-cell>
          <table:table-cell office:value-type="string" calcext:value-type="string">
            <text:p>Bracers of the Dwarven King</text:p>
          </table:table-cell>
          <table:table-cell office:value-type="string" calcext:value-type="string">
            <text:p>These golden gauntlets of dwarven make are quite old and have been worn by more than a few dwarven kings. <text:s/>Their last known owner was Garumn Battlehammer of Mithral Hall, but when his grandson Bruenor discovered his body, the gauntlets were missing. <text:s/>They appeared a few years later when a drow trader known as Nym sold them to a surfac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3</text:p>
          </table:table-cell>
          <table:table-cell office:value-type="string" calcext:value-type="string">
            <text:p>Bracers of Winter's Chill</text:p>
          </table:table-cell>
          <table:table-cell office:value-type="string" calcext:value-type="string">
            <text:p>These magical bracers were originally created by the clergy of Auril, the Frost Maiden. <text:s/>However, one of the priestesses had a crisis of faith and fled with the item. <text:s/>Aurelite assassins hounded her steps every way and eventually cornered her in Waterdeep. <text:s/>Fortunately for her, a group of adventurers intervened, saving her life. <text:s/>She joined the group and they had several adventures together. <text:s/>Eventually the group disappeared into the Underdark and was never seen agai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4</text:p>
          </table:table-cell>
          <table:table-cell office:value-type="string" calcext:value-type="string">
            <text:p>Bracers of the Wind</text:p>
          </table:table-cell>
          <table:table-cell office:value-type="string" calcext:value-type="string">
            <text:p>The highwayman Starkas boasted that his sword was fast as lightning, and his victims were often cut to pieces before they could even draw. <text:s/>However, one day Starkas made a fatal mistake when he tried to rob a lone knight who turned out to be a paladin of Tyr. <text:s/>Although he struck as quickly as ever, Storkas' blade failed to penetrate the paladin's armor, and he was eventually struck down himself.</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5</text:p>
          </table:table-cell>
          <table:table-cell office:value-type="string" calcext:value-type="string">
            <text:p>Gauntlets of Smiting</text:p>
          </table:table-cell>
          <table:table-cell office:value-type="string" calcext:value-type="string">
            <text:p>These iron gauntlets were created nearly twenty centuries ago when the human empire of Narfell practiced fiend summoning on a large scale. <text:s/>Exactly whom created these is not known, but likely it was the clergy of a benevolent deity at the time. <text:s/>Since then they have been worn by many a champion of good in an attempt to remove this fell taint from the Realms, a task that will never truly be complete as long as foolish mages are still willing to risk their life and soul for the promise of dark pow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6</text:p>
          </table:table-cell>
          <table:table-cell office:value-type="string" calcext:value-type="string">
            <text:p>Galdaeryn's Gage</text:p>
          </table:table-cell>
          <table:table-cell office:value-type="string" calcext:value-type="string">
            <text:p>Named for the fighting mage who first devised it, this single meshed gauntlet combines the powers of the Bracers of Archery, the Gloves of Missile Snaring and the Brooch of Shielding, granting the wearer complete mastery over missiles both mundane and magical.</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7</text:p>
          </table:table-cell>
          <table:table-cell office:value-type="string" calcext:value-type="string">
            <text:p>Gloves of Evasion</text:p>
          </table:table-cell>
          <table:table-cell office:value-type="string" calcext:value-type="string">
            <text:p>These soft, supple gloves of thin calfskin are enchanted to help a rogue evade capture. <text:s/>Exactly who made them is not known which is unsurprising, rogues and those who aid them tend to value privacy over fam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8</text:p>
          </table:table-cell>
          <table:table-cell office:value-type="string" calcext:value-type="string">
            <text:p>Hand of Fury</text:p>
          </table:table-cell>
          <table:table-cell office:value-type="string" calcext:value-type="string">
            <text:p>This heavy gauntlet has been enchanted with some offensive and defensive dweomers. <text:s/>It seems to be quite old, but is rather non-descript. <text:s/>It may be the early work of a now long forgotten Netherese arcanis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9</text:p>
          </table:table-cell>
          <table:table-cell office:value-type="string" calcext:value-type="string">
            <text:p>Gloves of Thievery</text:p>
          </table:table-cell>
          <table:table-cell office:value-type="string" calcext:value-type="string">
            <text:p>These enchanted gloves are popular with thieves, as they aid the wearer in obtaining items that aren't thei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tax1</text:p>
          </table:table-cell>
          <table:table-cell office:value-type="string" calcext:value-type="string">
            <text:p>Foesplitter +1</text:p>
          </table:table-cell>
          <table:table-cell office:value-type="string" calcext:value-type="string">
            <text:p>This mighty axe was forged by the shield dwarves of the North. <text:s/>The blade is incredibly sharp and it has been known to cleave more than a few fo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tax2</text:p>
          </table:table-cell>
          <table:table-cell office:value-type="string" calcext:value-type="string">
            <text:p>Trollkiller +2</text:p>
          </table:table-cell>
          <table:table-cell office:value-type="string" calcext:value-type="string">
            <text:p>This double-bladed dwarven axe was the favorite of the hero Durlag "Trollkiller". <text:s/>This was also the weapon he wielded during the terrifying tenday he spend fighting the dopplegangers that had infiltrated his tower. <text:s/>Afterwards, he could no longer bear to look at the weapon, and it sat forgotten on a treasure pile for many yea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tax3</text:p>
          </table:table-cell>
          <table:table-cell office:value-type="string" calcext:value-type="string">
            <text:p>Redethemar +4</text:p>
          </table:table-cell>
          <table:table-cell office:value-type="string" calcext:value-type="string">
            <text:p>This mighty axe was crafted by the elves of Myth Drannor and has since been wielded by several elven heroes all over Faerun. <text:s/>Normally reserved only for the greatest conflicts with the most dire foes, its appearance in Suldanessenar is testament to how deeply Irenicus' attack struck, and how far the elves are willing to go to stop him.</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tax4</text:p>
          </table:table-cell>
          <table:table-cell office:value-type="string" calcext:value-type="string">
            <text:p>Might of Heroes +3</text:p>
          </table:table-cell>
          <table:table-cell office:value-type="string" calcext:value-type="string">
            <text:p>This finely crafted enchanted war axe is obviously of dwarven make, but exactly where and when it was forged is not exactly known even to dwarven sages. <text:s/>Most likely it belonged to a dwarven clan now lost to history, perhaps wiped out by one of the all too frequent orc raids in the north. <text:s/>Likely discovered in some forgotten dwarven hall by adventurers, this axe has now seen many battles and has been wielded by several heroes of various races. <text:s/>This latter fact gave it its current nam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ull1</text:p>
          </table:table-cell>
          <table:table-cell office:value-type="string" calcext:value-type="string">
            <text:p>Priest's Bullet</text:p>
          </table:table-cell>
          <table:table-cell office:value-type="string" calcext:value-type="string">
            <text:p>These hollow glass sling bullets are filled with holy water. <text:s/>Upon impact they shatter, dousing the target in holy water. This deals additional damage to undead and fiends. <text:s/>These bullets are larger and heavier than normal, resulting in reduced accuracy and rang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ull2</text:p>
          </table:table-cell>
          <table:table-cell office:value-type="string" calcext:value-type="string">
            <text:p>Bullet of Pulverizing +1</text:p>
          </table:table-cell>
          <table:table-cell office:value-type="string" calcext:value-type="string">
            <text:p>After being thrown, these sling bullets magically enlarge in mid-air, impacting their target like a rock thrown by a catapult or gian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han1</text:p>
          </table:table-cell>
          <table:table-cell office:value-type="string" calcext:value-type="string">
            <text:p>Eversing +2</text:p>
          </table:table-cell>
          <table:table-cell office:value-type="string" calcext:value-type="string">
            <text:p>This beautiful, elven-crafted splint mail is a pure work of art. <text:s/>Each metal strip has been individually silvered, polished and engraved with a single elven rune. <text:s/>Although it is many centuries old, there is not a single scratch or speck of rust to be found, its beauty remains untarnishe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han2</text:p>
          </table:table-cell>
          <table:table-cell office:value-type="string" calcext:value-type="string">
            <text:p>Celestial Chain +2</text:p>
          </table:table-cell>
          <table:table-cell office:value-type="string" calcext:value-type="string">
            <text:p>Forged by the dwarven smith Brokk for &lt;CHARNAME&gt;, this suit of chain is as close to elven chain mail as a non-elf can possibly get to making. <text:s/>Meticulously woven from precisely crafted arandur rings by the old dwarf, it looks so smooth it almost resembles cloth. <text:s/>It is very light and comfortable to wear, and as such can be worn by thieves and multi-classed mages, although still at a small price to their abiliti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han3</text:p>
          </table:table-cell>
          <table:table-cell office:value-type="string" calcext:value-type="string">
            <text:p>Mail of Thalaera +5</text:p>
          </table:table-cell>
          <table:table-cell office:value-type="string" calcext:value-type="string">
            <text:p>Crafted of shining silver and matte black links, this suit of elven chain is one of the finest ever created. <text:s/>It used to stored in queen Amlaruil's palace on distant Evermeet but was stolen during an incident known as the Elshadow affair and considered lost until now. <text:s/>The elves will likely take a dim view of anyone using it for evil purposes. <text:s/>As with all other elven chain, this suit can be worm by Thieves and Fighter/Mages with few restriction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1</text:p>
          </table:table-cell>
          <table:table-cell office:value-type="string" calcext:value-type="string">
            <text:p>Mutamin's Cloak</text:p>
          </table:table-cell>
          <table:table-cell office:value-type="string" calcext:value-type="string">
            <text:p>This cloak was taken from the mad wizard Mutamin's body when he was slain by &lt;CHARNAME&gt; in the fields east of Beregost. <text:s/>No prior history is known, perhaps Mutamin himself created it in order to keep him safe from his own 'pe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2</text:p>
          </table:table-cell>
          <table:table-cell office:value-type="string" calcext:value-type="string">
            <text:p>Varazdin's Cloak of Protection</text:p>
          </table:table-cell>
          <table:table-cell office:value-type="string" calcext:value-type="string">
            <text:p>This cloak was created about two hundred years ago by the reclusive mage Varazdin, who often found himself in conflict with orcs that threatened his secluded home in the forest. <text:s/>It served him well until his death in yet another massive orc raid. <text:s/>The orc chieftain Groth Skullsmasher claimed it for himself, but he was in turn slain by a dwarven champion whose name has been lost to the ages. <text:s/>Since then, it has been worn by several adventurers. <text:s/>It was last seen in the possession of an adventuring party seeking to explore Durlag's Tower.</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clck3</text:p>
          </table:table-cell>
          <table:table-cell office:value-type="string" calcext:value-type="string">
            <text:p>Cloak of Arachnida</text:p>
          </table:table-cell>
          <table:table-cell office:value-type="string" calcext:value-type="string">
            <text:p>Cloaks of this kind are a boon both to those who ally themselves with giant spiders like some druids or the fearsome drow, and those who would fight against them, like most adventure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4</text:p>
          </table:table-cell>
          <table:table-cell office:value-type="string" calcext:value-type="string">
            <text:p>Cloak of the Night Sky</text:p>
          </table:table-cell>
          <table:table-cell office:value-type="string" calcext:value-type="string">
            <text:p>This enchanted blue-black cloak was fashioned in the near-mythical elven nation of Evermeet. <text:s/>Crafted to resemble the night sky, glowing stars move across it in a flowing pattern whenever it is worn. <text:s/>It bears a powerful protective enchantment, but that same enchantment also prevents it from being worn by those not of elven bloo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5</text:p>
          </table:table-cell>
          <table:table-cell office:value-type="string" calcext:value-type="string">
            <text:p>Bolder's Cloak of the Rogue</text:p>
          </table:table-cell>
          <table:table-cell office:value-type="string" calcext:value-type="string">
            <text:p>Centuries ago a brash noble of Waterdeep, who needed to be furtive in order to go adventuring, commissioned an unknown wizard to create the Cloak of the Rogue. <text:s/>This young man, whose name was Bolder, needed a magical item that would allow him to quietly slip away from his father's estate so he could spend his evenings in the wilds of Waterdeep. <text:s/>Bolder never returned from his first night out, and since then his cloak has been seen in the hands of the Zhentarim.</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6</text:p>
          </table:table-cell>
          <table:table-cell office:value-type="string" calcext:value-type="string">
            <text:p>Cloak of the Wastelands</text:p>
          </table:table-cell>
          <table:table-cell office:value-type="string" calcext:value-type="string">
            <text:p>For many years, this cloak was worn by a Bedine sorcerer known only as the Wanderer of the Wastes. <text:s/>Cast out by his superstitious tribe for his powers, he survived the Anauroch desert alone, sometimes lending a hand to those who lost their way amidst the dunes. <text:s/>It is not known how he obtained this item, but most sages agree he most likely found it in one of the many ruins hidden under the sa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7</text:p>
          </table:table-cell>
          <table:table-cell office:value-type="string" calcext:value-type="string">
            <text:p>Cloak of Lathander</text:p>
          </table:table-cell>
          <table:table-cell office:value-type="string" calcext:value-type="string">
            <text:p>Cloaks of this type are sometimes made by the clergy of Lathander, and sold or given to good-hearted adventurers who seek to combat undead foes. <text:s/>A bright orange-red, it resembles the color of the rising sun at dawn, the bane of vampires and many other walking dead that shun its cleansing ligh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8</text:p>
          </table:table-cell>
          <table:table-cell office:value-type="string" calcext:value-type="string">
            <text:p>Cloak of Flame</text:p>
          </table:table-cell>
          <table:table-cell office:value-type="string" calcext:value-type="string">
            <text:p>This strange cloak can only be worn by mages. <text:s/>It functions as a basic cloak of protection but has additional powers over fire. <text:s/>According to some tales it was once a normal cloak of protection until the wizard who wore it at the time died in the hellish blaze of a meteor swarm cast by a jealous rival. <text:s/>Partially infused with both the spirit of the departed wizard and the arcane fire that ended his life it became what it is now, or so the story go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9</text:p>
          </table:table-cell>
          <table:table-cell office:value-type="string" calcext:value-type="string">
            <text:p>Battlecloak of Vycaena</text:p>
          </table:table-cell>
          <table:table-cell office:value-type="string" calcext:value-type="string">
            <text:p>This voluminous, emerald-green cloak is trimmed and richly decorated with fine gold thread, and an emerald has been set in each of its two golden clasps. <text:s/>This alone would make it worth a fortune, but in addition to that the cloak carries an enchantment that protects its wearer almost as well as chain mail.</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comp1</text:p>
          </table:table-cell>
          <table:table-cell office:value-type="string" calcext:value-type="string">
            <text:p>Meteoric Iron</text:p>
          </table:table-cell>
          <table:table-cell office:value-type="string" calcext:value-type="string">
            <text:p>At first glance these seem to be worthless red rocks, but closer inspection reveals them to be fragments of an iron meteorite. <text:s/>This is useful as a crafting material, and might be worth something to a skilled smith.</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2</text:p>
          </table:table-cell>
          <table:table-cell office:value-type="string" calcext:value-type="string">
            <text:p>Arandur Ore</text:p>
          </table:table-cell>
          <table:table-cell office:value-type="string" calcext:value-type="string">
            <text:p>These shards of volcanic glass seem like a worthless curiosity at first, but closer inspection reveals they contain veins of arandur, a rare metal that is very prized by dwarven weaponsmith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3</text:p>
          </table:table-cell>
          <table:table-cell office:value-type="string" calcext:value-type="string">
            <text:p>Lux Veritatis</text:p>
          </table:table-cell>
          <table:table-cell office:value-type="string" calcext:value-type="string">
            <text:p>This arcane work describes the proper spells, materials, obscure rituals and other magical requirements needed to enchant a gem of great value into a magical device known as the Gem of Seeing. <text:s/>Only a master wizard with access to an arcane laboratory can properly use the knowledge in this book.</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4</text:p>
          </table:table-cell>
          <table:table-cell office:value-type="string" calcext:value-type="string">
            <text:p>Rusty Katana</text:p>
          </table:table-cell>
          <table:table-cell office:value-type="string" calcext:value-type="string">
            <text:p>This magical katana has dulled and rusted by years of neglect in a damp and harsh environment. <text:s/>However, there is still a bit of a gleam to it through the layers of corrosion. <text:s/>In its current state it would perform worse than an unenchanted blade and it might even break, but a skilled swordsmith could be able to restore some of its former glor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5</text:p>
          </table:table-cell>
          <table:table-cell office:value-type="string" calcext:value-type="string">
            <text:p>Unicorn Horn</text:p>
          </table:table-cell>
          <table:table-cell office:value-type="string" calcext:value-type="string">
            <text:p>This is an alicorn, the severed horn of a unicorn. <text:s/>A unicorn cannot live without its horn, so it is safe to assume that the unicorn this was taken from was either already dead or died soon after. <text:s/>Killing such a magnificent and benevolent creature is a great crime, but now that the deed has already been done, perhaps something good can come from it by putting it to a noble us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6</text:p>
          </table:table-cell>
          <table:table-cell office:value-type="string" calcext:value-type="string">
            <text:p>Black Dragon Scales</text:p>
          </table:table-cell>
          <table:table-cell office:value-type="string" calcext:value-type="string">
            <text:p>These are the scales harvested from the black dragon that Irenicus rode into Suldanessenar. <text:s/>Deep black yet glinting in the light, they feel strong and supple like tough leather. <text:s text:c="2"/>They could probably be made into some great armo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7</text:p>
          </table:table-cell>
          <table:table-cell office:value-type="string" calcext:value-type="string">
            <text:p>Green Dragon Scales</text:p>
          </table:table-cell>
          <table:table-cell office:value-type="string" calcext:value-type="string">
            <text:p>Bright green dragon scales from the wyrm who challenged you in Watcher's Keep. <text:s/>They may be used to create something new if you show them to the right pers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gg1</text:p>
          </table:table-cell>
          <table:table-cell office:value-type="string" calcext:value-type="string">
            <text:p>Catclaw +3</text:p>
          </table:table-cell>
          <table:table-cell office:value-type="string" calcext:value-type="string">
            <text:p>This dagger was once the property of a rogue known only as 'The Gray Mouser'. <text:s/>Details about this legendary rogue are vague at best. <text:s/>Some sources claim he came from a city named Lankhmar, but no city by that name exists in Faeru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gg2</text:p>
          </table:table-cell>
          <table:table-cell office:value-type="string" calcext:value-type="string">
            <text:p>Giantbane +1</text:p>
          </table:table-cell>
          <table:table-cell office:value-type="string" calcext:value-type="string">
            <text:p>This beautifully crafted dagger was clearly made by elves. <text:s/>Daggers like these are sometimes carried by elven commanders in the field of battle, especially if they expect to fight ogres, trolls or other giant humanoid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gg3</text:p>
          </table:table-cell>
          <table:table-cell office:value-type="string" calcext:value-type="string">
            <text:p>Golemblight +2</text:p>
          </table:table-cell>
          <table:table-cell office:value-type="string" calcext:value-type="string">
            <text:p>This mysterious dagger has been carved entirely from a strange red crystal that is harder than steel. <text:s/>It is particularly effective against golem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rt1</text:p>
          </table:table-cell>
          <table:table-cell office:value-type="string" calcext:value-type="string">
            <text:p>Lein's Fiery Dart +2</text:p>
          </table:table-cell>
          <table:table-cell office:value-type="string" calcext:value-type="string">
            <text:p>These small but deadly projectiles were created by Lein, an apprentice of the legendary enchanter Myrl who lived over two hundred years ago. <text:s/>Upon any contact this small projectile explodes and engulfs the target in flames. <text:s/>Although dozens of these darts have been made, a lot of them have also been used since, so they are a somewhat rare fi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rt2</text:p>
          </table:table-cell>
          <table:table-cell office:value-type="string" calcext:value-type="string">
            <text:p>Chandler's Icy Dart +2</text:p>
          </table:table-cell>
          <table:table-cell office:value-type="string" calcext:value-type="string">
            <text:p>These small but deadly projectiles were created by Chandler, an apprentice of the legendary enchanter Myrl who lived over two hundred years ago. <text:s/>Upon any contact this small projectile explodes and releases a freezing cloud at the target. <text:s/>Although dozens of these darts have been made, a lot of them have also been used since, so they are a somewhat rare fi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rag1</text:p>
          </table:table-cell>
          <table:table-cell office:value-type="string" calcext:value-type="string">
            <text:p>Black Dragon Scale</text:p>
          </table:table-cell>
          <table:table-cell office:value-type="string" calcext:value-type="string">
            <text:p>Although it looks like a fancy suit of studded leather at first glance, this armor has been crafted from the scales of a powerful black dragon. <text:s/>Like the beast they came from, this armor naturally resists acid and spell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rag2</text:p>
          </table:table-cell>
          <table:table-cell office:value-type="string" calcext:value-type="string">
            <text:p>Green Dragon Scale</text:p>
          </table:table-cell>
          <table:table-cell office:value-type="string" calcext:value-type="string">
            <text:p>This scale mail was crafted from the scales of a great green wyrm. <text:s/>In addition to a superior armor class, it also makes the wearer completely immune to poison and diseas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flai1</text:p>
          </table:table-cell>
          <table:table-cell office:value-type="string" calcext:value-type="string">
            <text:p>Slimecrusher +1</text:p>
          </table:table-cell>
          <table:table-cell office:value-type="string" calcext:value-type="string">
            <text:p>The head of this flail has been corroded from frequent contact with caustic substances, but remains intact and solid somehow. <text:s/>Created almost three hundred years ago to fight an infestation of gray ooze in the deepest reaches of the dwarven stronghold Heran's Quarry it served admirably, until it was stolen by marauding orcs more than half a century later. <text:s/>Since then it has changed hands several tim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flai2</text:p>
          </table:table-cell>
          <table:table-cell office:value-type="string" calcext:value-type="string">
            <text:p>Battle Star +4</text:p>
          </table:table-cell>
          <table:table-cell office:value-type="string" calcext:value-type="string">
            <text:p>This heavily enchanted flail was created by dwarves and it is unlikely they parted with it willingly. <text:s/>Its exact history is not known but the nature of the enchantment on it suggests an otherworldly origin, it may have come to Toril from Realmspac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alb1</text:p>
          </table:table-cell>
          <table:table-cell office:value-type="string" calcext:value-type="string">
            <text:p>Ghoulbane +1</text:p>
          </table:table-cell>
          <table:table-cell office:value-type="string" calcext:value-type="string">
            <text:p>This magical halberd was forged with the specific purpose of slaying ghouls and ghasts. <text:s/>Its exact origins have not been recorded, but it had been in the possession of the clergy of Helm for a long time and was wielded by various Watchme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amm1</text:p>
          </table:table-cell>
          <table:table-cell office:value-type="string" calcext:value-type="string">
            <text:p>Final Strike +3</text:p>
          </table:table-cell>
          <table:table-cell office:value-type="string" calcext:value-type="string">
            <text:p>This mighty war hammer was forged for and wielded by the dwarven hero Vanik Caveborn. <text:s/>A calm, calculated and methodical warrior, he would often say "It's not about who strikes first, but who strikes last!" <text:s/>After a career as an adventurer and mercenary that spanned almost two centuries, Vanik died of old age while preparing for a raid on a lich's lai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amm2</text:p>
          </table:table-cell>
          <table:table-cell office:value-type="string" calcext:value-type="string">
            <text:p>Maul of the Titans</text:p>
          </table:table-cell>
          <table:table-cell office:value-type="string" calcext:value-type="string">
            <text:p>This is a massive, immensely heavy and utterly unwieldy hammer that can only be used by giants and other creatures of similar strength. <text:s/>Should anyone be able to lift it though, a single blow would surely send an opponent flying.</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elm1</text:p>
          </table:table-cell>
          <table:table-cell office:value-type="string" calcext:value-type="string">
            <text:p>Helm of Valor</text:p>
          </table:table-cell>
          <table:table-cell office:value-type="string" calcext:value-type="string">
            <text:p>Also known as the "commander's helm", these golden helmets are often worn by elven generals and other high-ranking officials. <text:s/>Their enchantment serves to enable the commander to stay upright even in the face of enemy fire, inspiring both &lt;PRO_HISHER&gt; men and allowing &lt;PRO_HISHER&gt; to keep oversight of the battlefield. </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helm2</text:p>
          </table:table-cell>
          <table:table-cell office:value-type="string" calcext:value-type="string">
            <text:p>Helm of the Dwarven Lords</text:p>
          </table:table-cell>
          <table:table-cell office:value-type="string" calcext:value-type="string">
            <text:p>Although not nearly as powerful as the legendary Axe of the Dwarven Lords, this is none the less a rare and potent item that was worn by several dwarven kings of the past. <text:s/>It was last seen in old Delzoun more than a thousand years ago, but what happened to it when the old dwarven kingdom fell is not known. <text:s/>Perhaps orcs claimed it as a war trophy, or the drow pilfered it from the ruins. <text:s/>Only those of dwarven- or gnomish descent can make full use of this item's powers, others find that the helm will simply not fit their head properl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elm3</text:p>
          </table:table-cell>
          <table:table-cell office:value-type="string" calcext:value-type="string">
            <text:p>Wyvern Crown of Cormyr</text:p>
          </table:table-cell>
          <table:table-cell office:value-type="string" calcext:value-type="string">
            <text:p>This is the fabled Wyvern Crown of Cormyr, part of the regalia once worn by the Witch-Lords of the Wyvernwater before it was seized by the ancestors of King Azoun IV. <text:s/>It had lain in the vault of the royal palace for years until it was stolen by Zhentharim agents led by the infamous thief Nith while King Azoun IV was away fighting a Tuigan horde. <text:s/>However, during their escape they wandered into a wild magic area which interacted oddly with the artifact, breaking it in pieces and teleporting it away. <text:s/>It had been lost since, but here it stands now.</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elm4</text:p>
          </table:table-cell>
          <table:table-cell office:value-type="string" calcext:value-type="string">
            <text:p>Helm of Darkness</text:p>
          </table:table-cell>
          <table:table-cell office:value-type="string" calcext:value-type="string">
            <text:p>This helm is made from black iron and set with dark blue sapphires and black opals. <text:s/>The ambient light seems to darken slightly around this helm in a way that can only be magical. <text:s/>The helm makes the wearer resistant to cold and fear and grants some spell abilities. <text:s/>These include Horror, Ice Storm and Negative Plane Protecti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ide1</text:p>
          </table:table-cell>
          <table:table-cell office:value-type="string" calcext:value-type="string">
            <text:p>Winter Wolf Hide +1</text:p>
          </table:table-cell>
          <table:table-cell office:value-type="string" calcext:value-type="string">
            <text:p>This hide armor was sewn together from the hides of several winter wolves. <text:s/>Some of the latent magic of these majestic wolves remains, granting superior protection as well as insulation from cold. <text:s/>The armor remains uncomfortable to wear and appalling to look at though, and it will not fetch a high price in shop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ide2</text:p>
          </table:table-cell>
          <table:table-cell office:value-type="string" calcext:value-type="string">
            <text:p>White Hide of Umpluutu +2</text:p>
          </table:table-cell>
          <table:table-cell office:value-type="string" calcext:value-type="string">
            <text:p>Umpluutu was the name given to an unually large and strong polar bear that plagued the barbarian tribe of the Elk in the frozen tundras of the Spine of the World. <text:s/>When the barbarians finally felled the great beast, the tribe's shaman created this hide armor from its skin. <text:s/>How it came to leave the frozen north is not exactly know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1</text:p>
          </table:table-cell>
          <table:table-cell office:value-type="string" calcext:value-type="string">
            <text:p>Pale Blue Ioun Stone</text:p>
          </table:table-cell>
          <table:table-cell office:value-type="string" calcext:value-type="string">
            <text:p>The beautiful azure blue of this ioun stone resembles the sky on a warm summer da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2</text:p>
          </table:table-cell>
          <table:table-cell office:value-type="string" calcext:value-type="string">
            <text:p>Crystal Clear Ioun Stone</text:p>
          </table:table-cell>
          <table:table-cell office:value-type="string" calcext:value-type="string">
            <text:p>This ioun stone is so clear and transparent it becomes almost invisible. <text:s/>Such ioun stones can supposedly absorb and nullify magical energ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3</text:p>
          </table:table-cell>
          <table:table-cell office:value-type="string" calcext:value-type="string">
            <text:p>Bright Orange Ioun Stone</text:p>
          </table:table-cell>
          <table:table-cell office:value-type="string" calcext:value-type="string">
            <text:p>This bright orange ioun stone glows and throbs with pure power. <text:s/>Whom exacly made this item is not known and it resists divination, but historical records mention that this kind of ioun stone was popular with Netherese arcanists so it most likely belonged to one of them onc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4</text:p>
          </table:table-cell>
          <table:table-cell office:value-type="string" calcext:value-type="string">
            <text:p>Telkiira</text:p>
          </table:table-cell>
          <table:table-cell office:value-type="string" calcext:value-type="string">
            <text:p>This is an elven telkiira, or lore-stone in the common tongue. <text:s/>Such gems contain a portion of the knowledge and experience of previous bearers and as such enhance the mental prowess <text:s/>and arcane abilities of its current owner. <text:s/>Only those of elven blood can safely use a telkiira, use by a non-elf is extremely dangerous and likely to result in permanent insanit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5</text:p>
          </table:table-cell>
          <table:table-cell office:value-type="string" calcext:value-type="string">
            <text:p>Mottled Green Ioun Stone</text:p>
          </table:table-cell>
          <table:table-cell office:value-type="string" calcext:value-type="string">
            <text:p>This ioun stone is a lush green with many yellow spots. <text:s/>It is very pleasant to look at, and grants some protection against magical spells and effec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6</text:p>
          </table:table-cell>
          <table:table-cell office:value-type="string" calcext:value-type="string">
            <text:p>Maroon Star Ioun Stone</text:p>
          </table:table-cell>
          <table:table-cell office:value-type="string" calcext:value-type="string">
            <text:p>This chestnut-colored ioun stone is quite old and bears an unusual enchantment. <text:s/>Its exact history has been lost to the mists of time, but most likely it was made in old Netheril, perhaps even by Congenio Ioun himself.</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7</text:p>
          </table:table-cell>
          <table:table-cell office:value-type="string" calcext:value-type="string">
            <text:p>Blood of Lathander</text:p>
          </table:table-cell>
          <table:table-cell office:value-type="string" calcext:value-type="string">
            <text:p>Centuries ago Mystra selected the archmage Sammaster as one of her Chosen. <text:s/>Overwhelmed by the power invested in him, he developed delusions of godhood and set himself up as a seer. <text:s/>His teachings that "dead dragons shall rule the world entire" started the Cult of the Dragon. <text:s/>Sammaster and the cultists then set out to fulfill this prophesy by creating dracoliches and serving them by bringing them treasur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8</text:p>
          </table:table-cell>
          <table:table-cell office:value-type="string" calcext:value-type="string">
            <text:p>Lovely Pink Ioun Stone</text:p>
          </table:table-cell>
          <table:table-cell office:value-type="string" calcext:value-type="string">
            <text:p>This cheerfully colored ioun stones makes its owner a little more charming.</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lbow1</text:p>
          </table:table-cell>
          <table:table-cell office:value-type="string" calcext:value-type="string">
            <text:p>Bow of Eletha</text:p>
          </table:table-cell>
          <table:table-cell office:value-type="string" calcext:value-type="string">
            <text:p>This bow once belonged to the green elf Eletha, a legendary archer and hero. <text:s/>How it came to leave elven lands is unknown, but the elves would certainly like it returned, and would no doubt take a dim view of anyone found using it for evil purpos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ace1</text:p>
          </table:table-cell>
          <table:table-cell office:value-type="string" calcext:value-type="string">
            <text:p>Radiant Star +1</text:p>
          </table:table-cell>
          <table:table-cell office:value-type="string" calcext:value-type="string">
            <text:p>This radiant golden mace was created by a joined effort between the temples of Lathander and Selune, and is blessed by both deities. <text:s/>Made from alchemically treated gold, it is heavier and slower to swing than a standard mace, but it deals extra damage to many things that go bump in the night. <text:s/>It can also damage some enemies with unusual defenses, like the loup garou and certain demonic being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ace2</text:p>
          </table:table-cell>
          <table:table-cell office:value-type="string" calcext:value-type="string">
            <text:p>Heaven's Wrath +4</text:p>
          </table:table-cell>
          <table:table-cell office:value-type="string" calcext:value-type="string">
            <text:p>This powerful mace was crafted by the clergy of the Netherese sun god Amaunator many centuries ago, but there are no records of it ever having been used against any foes of the empire. <text:s/>It is known that a deep dragon found it in the buried rubble of a Netherese enclave and added it to its hoard. <text:s/>The fact that Adalon has now given it to you hints that she dispatched the deep dragon at some poin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ace3</text:p>
          </table:table-cell>
          <table:table-cell office:value-type="string" calcext:value-type="string">
            <text:p>Skull Mace +2</text:p>
          </table:table-cell>
          <table:table-cell office:value-type="string" calcext:value-type="string">
            <text:p>This weapon is surrounded by a palpable aura of darkest evil, and no good creature should ever even think about using it. <text:s/>Evil priests however would go to great lengths to obtain a weapon like thi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1</text:p>
          </table:table-cell>
          <table:table-cell office:value-type="string" calcext:value-type="string">
            <text:p>Pearl of Power</text:p>
          </table:table-cell>
          <table:table-cell office:value-type="string" calcext:value-type="string">
            <text:p>This beautiful black pearl would fetch a nice price for its rarity alone, but its enchantment makes it even more valuable. <text:s/>Many a less scrupulous sorcerer would kill to get hold of an item like this, and even those who do have morals will often go to great lengths to obtain on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2</text:p>
          </table:table-cell>
          <table:table-cell office:value-type="string" calcext:value-type="string">
            <text:p>Bag of Tricks</text:p>
          </table:table-cell>
          <table:table-cell office:value-type="string" calcext:value-type="string">
            <text:p>At first glance this appears to be a common burlap sack, but this mundane appearance hides a powerful magic. <text:s/>When the owner reaches inside the bag, &lt;PRO_HESHE&gt; feels a number of fuzzy objects inside. <text:s/>When such an object is pulled out and tossed to the ground it instantly grows into a ferocious animal that will fight its summoner's enemies to the best of its ability until it is slain or one hour pass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3</text:p>
          </table:table-cell>
          <table:table-cell office:value-type="string" calcext:value-type="string">
            <text:p>Crystal Ball</text:p>
          </table:table-cell>
          <table:table-cell office:value-type="string" calcext:value-type="string">
            <text:p>This is a crystal ball, probably one of the most well-known magical items in existence and frequently used by wizards, priests, shamans, witch-doctors, gypsies and other people with a knack for magic to remotely view places of interest. <text:s/>The ball only has a limited number of charges, and when they run out it shatters into useless shard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4</text:p>
          </table:table-cell>
          <table:table-cell office:value-type="string" calcext:value-type="string">
            <text:p>Gem of Seeing</text:p>
          </table:table-cell>
          <table:table-cell office:value-type="string" calcext:value-type="string">
            <text:p>Peering through this magical gem allows the user to see the world around &lt;PRO_HIMHER&gt; as it truly is, piercing all kinds of invisibility and illusion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5</text:p>
          </table:table-cell>
          <table:table-cell office:value-type="string" calcext:value-type="string">
            <text:p>Horn of Goodness/Evil</text:p>
          </table:table-cell>
          <table:table-cell office:value-type="string" calcext:value-type="string">
            <text:p>The effect of this magical horn depends on the alignment of the user. <text:s/>if the user is good, it protects &lt;PRO_HISHER&gt; party against evil. <text:s/>If the user is evil it protects &lt;PRO_HISHER&gt; party against good. <text:s/>If the user is neither evil nor good the horn doesn't work at all. <text:s/>The horn can be blown once per da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6</text:p>
          </table:table-cell>
          <table:table-cell office:value-type="string" calcext:value-type="string">
            <text:p>Bottle of Pleasant Odors</text:p>
          </table:table-cell>
          <table:table-cell office:value-type="string" calcext:value-type="string">
            <text:p>The noblewoman Lady Devanna of Baldur's Gate commissioned this enchanted bottle from the temple of Gond after one too many pranks involving the Stinking Cloud spell was played on h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7</text:p>
          </table:table-cell>
          <table:table-cell office:value-type="string" calcext:value-type="string">
            <text:p>Orb of Dragonkind</text:p>
          </table:table-cell>
          <table:table-cell office:value-type="string" calcext:value-type="string">
            <text:p>This fabled artifact has many myths and legends surrounding it, and seprating the facts from the fables has lead to many scholary debates among the sages. <text:s/>It is generally accepted that the Orbs of Dragonkind were the result of some sort of truce between the ancient dragons and early humanoids, but the humans, elves, dwarves and dragons all have their own versions of how this came to b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lat1</text:p>
          </table:table-cell>
          <table:table-cell office:value-type="string" calcext:value-type="string">
            <text:p>Dwarven Plate +1</text:p>
          </table:table-cell>
          <table:table-cell office:value-type="string" calcext:value-type="string">
            <text:p>This stout plate was commissioned from the dwarven smith Brokk by &lt;CHARNAME&gt;. <text:s/>Forged entirely from the rare metal arandur, it is the pinnacle of the craftsmanship of the old dwarf. <text:s/>Dwarven runes of protection have been meticulously engraved in the metal and filled with fine gold, adding aditional protection. <text:s/>Much lighter than most plate and yet extremely resistant to physical damage, this plate was made to last a dwarven lifetim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lat3</text:p>
          </table:table-cell>
          <table:table-cell office:value-type="string" calcext:value-type="string">
            <text:p>Laeral's Storm Armor +2</text:p>
          </table:table-cell>
          <table:table-cell office:value-type="string" calcext:value-type="string">
            <text:p>Named after the wizard who devised it, Laeral Stormhand of the Seven Sisters, this is an unusual armor. <text:s/>It is entirely constructed out of a peculiar non-metallic material that does not conduct electricity or heat. <text:s/>As such it renders the wearer completely immune to Fireball, Lightning Bolt, Cone of Cold and similar spell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lat4</text:p>
          </table:table-cell>
          <table:table-cell office:value-type="string" calcext:value-type="string">
            <text:p>Plate of Solamnus +5</text:p>
          </table:table-cell>
          <table:table-cell office:value-type="string" calcext:value-type="string">
            <text:p>This beautiful suit of field plate has been decorated with the markings of all three Solamnic orders. <text:s/>The sigil of the Order of the Rose is displayed most prominently. <text:s/>Armor of this quality is not made anymore and therefor exeedingly rar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1</text:p>
          </table:table-cell>
          <table:table-cell office:value-type="string" calcext:value-type="string">
            <text:p>Oil of Acid Resistance</text:p>
          </table:table-cell>
          <table:table-cell office:value-type="string" calcext:value-type="string">
            <text:p>This ethereal oil, when applied to the skin and exposed equipment, bestows virtual immunity to all forms of acid, including ankheg spittle and the corrosive breath of black dragons. <text:s/>All damage by acid is reduced by 90%. <text:s/>The effect lasts for 10 turns or until dispelle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2</text:p>
          </table:table-cell>
          <table:table-cell office:value-type="string" calcext:value-type="string">
            <text:p>Potion of Clairvoyance</text:p>
          </table:table-cell>
          <table:table-cell office:value-type="string" calcext:value-type="string">
            <text:p>Upon drinking this potion, the user will see in &lt;PRO_HISHER&gt; mind a bird's eye view of the surrounding terrain, revealing structures and landmarks. <text:s/>Living creatures are not revealed by the use of this poti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3</text:p>
          </table:table-cell>
          <table:table-cell office:value-type="string" calcext:value-type="string">
            <text:p>Potion of Wizardry</text:p>
          </table:table-cell>
          <table:table-cell office:value-type="string" calcext:value-type="string">
            <text:p>This potion only affects wizards, letting them operate as if they were three levels higher than they actually are. <text:s/>This affects all variables of a spell that depend on caster level such as damage done. duration etc. <text:s/>It also grants a boost to casting speed. <text:s/>However, it does not grant additional spell slo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4</text:p>
          </table:table-cell>
          <table:table-cell office:value-type="string" calcext:value-type="string">
            <text:p>Oil of Disenchantment</text:p>
          </table:table-cell>
          <table:table-cell office:value-type="string" calcext:value-type="string">
            <text:p>This light, ethereal oil quickly evaporates when exposed to air. <text:s/>As it evaporates, it will dispel all enchantments, making this oil ideal for removing unwanted enchantments from party membe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5</text:p>
          </table:table-cell>
          <table:table-cell office:value-type="string" calcext:value-type="string">
            <text:p>Potion of Longevity</text:p>
          </table:table-cell>
          <table:table-cell office:value-type="string" calcext:value-type="string">
            <text:p>This foul-tasting but very potent elixer permanently enhances the imbiber's health and hardiness. <text:s/>Their maximum HP total is raised by 10. <text:s/>However, repeated drinks carry a risk; there is a 5% change that another draught of this elixer will undo the effects of all previous drink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6</text:p>
          </table:table-cell>
          <table:table-cell office:value-type="string" calcext:value-type="string">
            <text:p>Alchemist's Fire</text:p>
          </table:table-cell>
          <table:table-cell office:value-type="string" calcext:value-type="string">
            <text:p>This is a bottle of alchemist's fire, a secret mixture of oils and volatile substances that ignites on contact with the air. <text:s/>While it is not explosive like an Oil of Fiery burning, the substance still burns with a very hot flame, inclicting fire damage on whatever the bottle is thrown at. <text:s/>It also has the advantage of being a completely non-magical effect, so it can damage even things that resist magic.</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7</text:p>
          </table:table-cell>
          <table:table-cell office:value-type="string" calcext:value-type="string">
            <text:p>Flask of Acid</text:p>
          </table:table-cell>
          <table:table-cell office:value-type="string" calcext:value-type="string">
            <text:p>This is a bottle of concentrated acid, refined and distilled through secret alchemical processes. <text:s/>When thrown at a target, the acid will spread over it, inflicting damage. <text:s/>If not neutralized or washed off somehow, the acid will do more damage after a round, then it becomes inert. <text:s/>This is a completely non-magical effect, so it may damage even things that resist magic.</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1</text:p>
          </table:table-cell>
          <table:table-cell office:value-type="string" calcext:value-type="string">
            <text:p>Ring of the Elven Mage</text:p>
          </table:table-cell>
          <table:table-cell office:value-type="string" calcext:value-type="string">
            <text:p>Ring of Protection +3/+1: 'Ring of the Elven Mag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2</text:p>
          </table:table-cell>
          <table:table-cell office:value-type="string" calcext:value-type="string">
            <text:p>Ring of Warmth</text:p>
          </table:table-cell>
          <table:table-cell office:value-type="string" calcext:value-type="string">
            <text:p>This type of magical ring is often sought by those who are regularly exposed to freezing conditions, like mountaineers, explorers and, of course, adventurers. <text:s/>The ring keeps the wearer comfortably warm in all but the most extreme cold weather, and reduces the damage done by freezing attacks like the Ice Storm spell or the chilling breath of a winter wolf.</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3</text:p>
          </table:table-cell>
          <table:table-cell office:value-type="string" calcext:value-type="string">
            <text:p>Ring of the Neophyte</text:p>
          </table:table-cell>
          <table:table-cell office:value-type="string" calcext:value-type="string">
            <text:p>Wizards sometimes create rings like these for very promising apprentices, both as a reward for their years of service and to provide their prize students with a small advantage on the hard and often dangerous road to arcane master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4</text:p>
          </table:table-cell>
          <table:table-cell office:value-type="string" calcext:value-type="string">
            <text:p>Ring of White Bone</text:p>
          </table:table-cell>
          <table:table-cell office:value-type="string" calcext:value-type="string">
            <text:p>Rings of this type are sometimes created by necromancers to provide them with protection from their own nefarious creations. <text:s/>The more powerful intelligent undead resent being controlled by the living, and one breaking free from control can quickly end the aspiring necromancer's career, as well as &lt;PRO_HISHER&gt; lif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5</text:p>
          </table:table-cell>
          <table:table-cell office:value-type="string" calcext:value-type="string">
            <text:p>Ring of Mind Shielding</text:p>
          </table:table-cell>
          <table:table-cell office:value-type="string" calcext:value-type="string">
            <text:p>This ring protects the wearer's mind from all external influences such as psionic abilities and spells like Domination. <text:s/>No prior history is known, this ring seems to have been crafted very recently. <text:s/>It would be a great boon for any hero who has to explore the Underdark though, as it provides solid defenses against some of its more horrid denizens, especially the mind flayers. <text:s/>Perhaps it can earn a name and history for itself in this wa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6</text:p>
          </table:table-cell>
          <table:table-cell office:value-type="string" calcext:value-type="string">
            <text:p>Ring of Shooting Stars</text:p>
          </table:table-cell>
          <table:table-cell office:value-type="string" calcext:value-type="string">
            <text:p>This unusual elven-made ring throbs with power. <text:s/>It dates back to the days of Myth Drannor, were it was possibly the cause of the destruction of the Rule Tower in the Year of Stern Judgment (666 DR). <text:s/>Since then it has left a path of chaos and destruction throughout history, having been used in several wars. <text:s/>Although the ring is not cursed in any way, it seems to be drawn to violent conflicts, and its appearance has become a bad omen to many.</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ring7</text:p>
          </table:table-cell>
          <table:table-cell office:value-type="string" calcext:value-type="string">
            <text:p>Spellbattle Ring</text:p>
          </table:table-cell>
          <table:table-cell office:value-type="string" calcext:value-type="string">
            <text:p>The first ring of this type was crafted by an unknown archmage who was tired of having to memorize spells for wizard duels every day because lesser mages kept challenging them. <text:s/>Several other archmages followed their example and there are now more than a dozen magical rings of this type known to be arou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8</text:p>
          </table:table-cell>
          <table:table-cell office:value-type="string" calcext:value-type="string">
            <text:p>Ring of Armory</text:p>
          </table:table-cell>
          <table:table-cell office:value-type="string" calcext:value-type="string">
            <text:p>This ring is a creation of an abjurer named Delgam of the Many Hands - so called for his extensive use of the expression "on the other hand..." <text:s/>Delgam eschewed imbuing his items with offensive powers or other miscellaneous magic effects. <text:s/>Instead, he focused on what abjurers tend to focus on: defense. <text:s/>Unlike his popular Robes of Armory, this ring is somewhat obscure as most powerful mages consider the basic defensive spells in it beneath them. <text:s/>To a neophyte it is an extremely useful item though, providing basic defense spells so that the fledgling wizard can concentrate on memorizing other incantations without having to worry about &lt;PRO_HISHER&gt; safet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9</text:p>
          </table:table-cell>
          <table:table-cell office:value-type="string" calcext:value-type="string">
            <text:p>Ring of Water Control</text:p>
          </table:table-cell>
          <table:table-cell office:value-type="string" calcext:value-type="string">
            <text:p>This silver ring has a single deep blue sapphire set into it. <text:s/>This somewhat simple appearance belies its great power over the element of wat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a</text:p>
          </table:table-cell>
          <table:table-cell office:value-type="string" calcext:value-type="string">
            <text:p>Ring of the Lich</text:p>
          </table:table-cell>
          <table:table-cell office:value-type="string" calcext:value-type="string">
            <text:p>This magical ring was created centuries ago by Antares the Necromancer, a Netherese arcanist of considerable power, as a defense against the many assassins his rivals would send after him. <text:s/>When Karsus cast his fateful spell and High Netheril fell from the sky, Antares was just completing the final stages of transformation into a lich. <text:s/>He was presumed dead when his enclave plunged into the Sea of Swords, a few miles outward from Candlekeep.</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b</text:p>
          </table:table-cell>
          <table:table-cell office:value-type="string" calcext:value-type="string">
            <text:p>Ring of the Hierophant</text:p>
          </table:table-cell>
          <table:table-cell office:value-type="string" calcext:value-type="string">
            <text:p>Created by a Cormanthian archdruid hundreds of years ago, this enchanted ring was traditionally worn by the oldest living druid in the great forest. <text:s/>At some point the ring was stolen by an unknown thief, and until now hadn't been seen for at least a centur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c</text:p>
          </table:table-cell>
          <table:table-cell office:value-type="string" calcext:value-type="string">
            <text:p>Browdow's Ring</text:p>
          </table:table-cell>
          <table:table-cell office:value-type="string" calcext:value-type="string">
            <text:p>The full name of this enchanted ring is actually "Browdow's Ring of Utmost Weapon Harm</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d</text:p>
          </table:table-cell>
          <table:table-cell office:value-type="string" calcext:value-type="string">
            <text:p>Ring of Fearlessness</text:p>
          </table:table-cell>
          <table:table-cell office:value-type="string" calcext:value-type="string">
            <text:p>It is uncertain how many of these deadly rings exist. <text:s/>The first one was crafted by a Waterdhavian wizard named Julius Silverheart in 762 DR. <text:s/>Silverheart, who was known for his bravery, felt ashamed for his cowardly apprentice Jed. <text:s/>Wanting him to lead an adventurous life, Silverheard attempted to craft a Ring of Courage for him, and was reported to make a few more for sale. <text:s/>However, the results were not quite as expecte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e</text:p>
          </table:table-cell>
          <table:table-cell office:value-type="string" calcext:value-type="string">
            <text:p>Ring of Izmur</text:p>
          </table:table-cell>
          <table:table-cell office:value-type="string" calcext:value-type="string">
            <text:p>If liches excel in one thing, it's combining existing items and spells in new and unusual ways. <text:s/>This ring, a combination of your old Ring of Free Action with the Time Stop spell, is such an item. <text:s/>You do not know which lich Cespenar bribed to create this item for you, and it's likely better for all to simply not ask.</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1</text:p>
          </table:table-cell>
          <table:table-cell office:value-type="string" calcext:value-type="string">
            <text:p>Robe of the Elements</text:p>
          </table:table-cell>
          <table:table-cell office:value-type="string" calcext:value-type="string">
            <text:p>Unsatisfied with the basic mage robes, Zavoros the Moderately Insane experimented to find a more powerful enchantment for his personal wardrobe. <text:s/>After two explosions, the village being overrun with a horde of accidentally summoned gibberlings, and his latest prototype coming apart at the seams in the town square, he finally came up with this design. <text:s/>At this point however, he was asked in rather firm terms to perform his experiments in a more remote location, and to never wear untested prototype robes in public agai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2</text:p>
          </table:table-cell>
          <table:table-cell office:value-type="string" calcext:value-type="string">
            <text:p>Robe of the Necromancer</text:p>
          </table:table-cell>
          <table:table-cell office:value-type="string" calcext:value-type="string">
            <text:p>This robe was created by the Netherese arcanist Jeharis the Red after one too many instances of his own undead creations escaping his control. <text:s/>Jeharis escaped the fall of Netheril because he was in his secret lair in the Stormhorn mountains at the time, where he eventually transformed himself into a lich. <text:s/>For one of his gruesome experiments he needed the souls of thirteen virgins, and the subsequent kidnappings eventually led to adventurers finding his lair and destroying the Crimson Flame as he now called himself in an epic battle. <text:s/>His robe survived the battle and was claimed as a prize by the victors, though what exactly happened to it afterwards and how it arrived in its current location is a riddle for the ag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3</text:p>
          </table:table-cell>
          <table:table-cell office:value-type="string" calcext:value-type="string">
            <text:p>Robe of the Pure Heart</text:p>
          </table:table-cell>
          <table:table-cell office:value-type="string" calcext:value-type="string">
            <text:p>A priestess of Sune created these robes for a monk lover. <text:s/>Unfortunately the name turned out be a misnomer; her lover cheated her with another woman. <text:s/>Heart broken she left, taking the robe with her. <text:s/>An adventuring party found her corpse in the woods almost a year later, she had apparently fallen victim to bandits. <text:s/>Having no use for it they eventually sold it to a visiting Calishite monk.</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4</text:p>
          </table:table-cell>
          <table:table-cell office:value-type="string" calcext:value-type="string">
            <text:p>Shadow Dancer's Robe</text:p>
          </table:table-cell>
          <table:table-cell office:value-type="string" calcext:value-type="string">
            <text:p>Unknown to most surfacers, the drow have a small but succesful monk tradition. <text:s/>They make great assassins, needing no weapons to be lethal in combat. <text:s/>The Shadow Dancer was one such assassin, and was sent to murder the king of a nearby dwarven hall. <text:s/>The attempt succeeded, but the crown prince relentlessly pursued the killer and eventually avenged his father. <text:s/>Later on the dwarven hall was abandoned in a hurry and fell in ruin, and adventurers eventually found this robe in a chest buried under the rubbl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5</text:p>
          </table:table-cell>
          <table:table-cell office:value-type="string" calcext:value-type="string">
            <text:p>Nyalee's Robe of Stone</text:p>
          </table:table-cell>
          <table:table-cell office:value-type="string" calcext:value-type="string">
            <text:p>This garment looks rather plain at first glance, but it bears powerful protective enchantments. <text:s/>Although it is as soft and supple as a normal robe to the wearer, attackers find the exterior as hard as stone due to an earth elemental being woven into the fabric.</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6</text:p>
          </table:table-cell>
          <table:table-cell office:value-type="string" calcext:value-type="string">
            <text:p>Ghastrobe</text:p>
          </table:table-cell>
          <table:table-cell office:value-type="string" calcext:value-type="string">
            <text:p>This literally ghastly robe was found on the body of the evil cleric Bassilus. <text:s/>Donning this robe gives the wearer several of the abilities of a ghast. <text:s/>It is also completely horrific to look at and only the most demented necromancer or vile priest would want to be seen wearing one.</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shld1</text:p>
          </table:table-cell>
          <table:table-cell office:value-type="string" calcext:value-type="string">
            <text:p>Meteoric Shield +2</text:p>
          </table:table-cell>
          <table:table-cell office:value-type="string" calcext:value-type="string">
            <text:p>Forged for &lt;CHARNAME&gt; by the dwarven smith Brokk, this shield is quite a work of art. <text:s/>The tough meteoric iron not only provides excellent physical protection, but also seems to dampen bursts of magical energy, protecting the wielder from raw magical damage like that inflicted by the Magic Missile spell. <text:s/>This shield is a bit heavier than a regular one though.</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hld2</text:p>
          </table:table-cell>
          <table:table-cell office:value-type="string" calcext:value-type="string">
            <text:p>Ankheg Shield +1</text:p>
          </table:table-cell>
          <table:table-cell office:value-type="string" calcext:value-type="string">
            <text:p>The dwarven smith Brokk created this shield for &lt;CHARNAME&gt; from the carapace of an ankheg. <text:s/>Such material has several advantages over using steel, it cannot rust and weighs much less. <text:s/>Druids can also use it without restriction. <text:s/>The only drawback is in the inherent danger of procuring the base material.</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hld3</text:p>
          </table:table-cell>
          <table:table-cell office:value-type="string" calcext:value-type="string">
            <text:p>Shield of the Phoenix +2</text:p>
          </table:table-cell>
          <table:table-cell office:value-type="string" calcext:value-type="string">
            <text:p>The Order of the Phoenix was a paladin order several hundred years ago. <text:s/>The cause of the order's disappearance is unclear, some claim they fell to an orc horde, others say a clash of faith ripped them apart, and yet others whisper it was the work of dark forces. <text:s/>Perhaps all of these are to blame to some degree. <text:s/>Fact is that the order disappeared almost overnight, and only their iconic shields, occasionally found in an orc lair or dragon hoard, remai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hld4</text:p>
          </table:table-cell>
          <table:table-cell office:value-type="string" calcext:value-type="string">
            <text:p>Shield of the Three Kings +5</text:p>
          </table:table-cell>
          <table:table-cell office:value-type="string" calcext:value-type="string">
            <text:p>The name of this masterwork golden shield is derived from the three crowns engraved in its front, for it hasn't been associated with any known king. <text:s/>It was forged by the shield dwarves of the North to be used in one of their many skirmishes with the orc hordes that regular plague that area of Faerun. <text:s/>It is not known whom exactly placed the massive enchantment on it, although the style used is typical for the Netherese arcanists of the past. <text:s/>If the dwarves truly traded for this shield with the Netherese, the price demanded must have been mind boggling. <text:s/>This is possibly the most strongly enchanted shield in the Realm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hld5</text:p>
          </table:table-cell>
          <table:table-cell office:value-type="string" calcext:value-type="string">
            <text:p>Force Buckler</text:p>
          </table:table-cell>
          <table:table-cell office:value-type="string" calcext:value-type="string">
            <text:p>Although it is only lightly enchanted, this buckler is remarkable in the sense that it projects a field of force similar to a Shield spell, making it effective against missiles and piercing attacks unlike most buckle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per1</text:p>
          </table:table-cell>
          <table:table-cell office:value-type="string" calcext:value-type="string">
            <text:p>Alicorn Spear +2</text:p>
          </table:table-cell>
          <table:table-cell office:value-type="string" calcext:value-type="string">
            <text:p>This masterwork spear has been tipped by an alicorn, the actual horn of a unicorn. <text:s/>It was commissioned from the dwarven smith Brokk by &lt;CHARNAME&gt;, who found the horn in a bandit camp. <text:s/>Most likely the slayer of the unicorn in question is now dead themselves, and perhaps the creation of this item can do some good in the Realm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per2</text:p>
          </table:table-cell>
          <table:table-cell office:value-type="string" calcext:value-type="string">
            <text:p>Hadrion's Spear +3</text:p>
          </table:table-cell>
          <table:table-cell office:value-type="string" calcext:value-type="string">
            <text:p>Hadrion, a minor warlord, purchased this magical spear at great cost and then had wizards further enchant it with additional powers. <text:s/>Hadrion used the spear in all his campains and it is said to have been buried with him in his familiy vaults. <text:s/>How it came to its current location is not know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taf1</text:p>
          </table:table-cell>
          <table:table-cell office:value-type="string" calcext:value-type="string">
            <text:p>Staff of Rumathil +2</text:p>
          </table:table-cell>
          <table:table-cell office:value-type="string" calcext:value-type="string">
            <text:p>This ancient staff of elven make is a boon to both wizards and clerics. <text:s/>The exact origin is a mystery even to the elves themselves, but it is said to have been crafted in the secret elven nation of Evermeet. <text:s/>How exactly it made its way to the mainland is not known eith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taf2</text:p>
          </table:table-cell>
          <table:table-cell office:value-type="string" calcext:value-type="string">
            <text:p>Staff of Swarming Insects +2</text:p>
          </table:table-cell>
          <table:table-cell office:value-type="string" calcext:value-type="string">
            <text:p>The length of this unusual staff is covered with fine carvings of winged biting and stinging insects like wasps, horseflies and so on. <text:s/>A cleric or druid can use this staff to call down a swarm of such insects on an opponent, as per the third level spell Summon Insects. <text:s/>This ability is limited by charges though.</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taf3</text:p>
          </table:table-cell>
          <table:table-cell office:value-type="string" calcext:value-type="string">
            <text:p>Staff of Water +2</text:p>
          </table:table-cell>
          <table:table-cell office:value-type="string" calcext:value-type="string">
            <text:p>This old, crooked staff has been fashioned in the style of the witches of Rasheman. <text:s/>The runes inscribed on it indicate it has power over water, including summoning lesser Water Elementals to the user's aid, or quickly dispatching hostile Water Elementals. <text:s/>Drawing upon the Plane of Water, it can also summon a cold aura similar to a Blue Fire Shield that damages attackers. <text:s/>Some abilities are limited by charges howev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taf4</text:p>
          </table:table-cell>
          <table:table-cell office:value-type="string" calcext:value-type="string">
            <text:p>Staff of the Legion +5</text:p>
          </table:table-cell>
          <table:table-cell office:value-type="string" calcext:value-type="string">
            <text:p>This staff radiates a pallable aura of darkness and evil. <text:s/>It was created many centuries ago by a being known only as Ahksar the Lich King. <text:s/>Details on this entity are vague and incomplete, but he was apparently a horrifyingly powerful lich. <text:s/>He may in fact have been the very first of such beings ever created. <text:s/>Many necromantic spells that are still in use today, including the spell Animate Dead, may have been first developed by him.</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1</text:p>
          </table:table-cell>
          <table:table-cell office:value-type="string" calcext:value-type="string">
            <text:p>Terminus Est +2</text:p>
          </table:table-cell>
          <table:table-cell office:value-type="string" calcext:value-type="string">
            <text:p>When lady Walraven was judged guilty of high treason and sentenced to death, she had but one last request, that her delicate neck be spared the crude executioner's axe. <text:s/>The village smith then forged this sword, and a knight beheaded her with it. <text:s/>The sword was placed in Walraven keep, but not for long. <text:s/>A week later, both the keep and the village were razed to the ground by an orc horde, and the sword was among the many things pillaged. <text:s/>The tribe's shaman enchanted it and for years it served as the weapon of the chieftain until he fell in a fight against a paladin from Waterdeep.</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2</text:p>
          </table:table-cell>
          <table:table-cell office:value-type="string" calcext:value-type="string">
            <text:p>Smythe's Slicer +1</text:p>
          </table:table-cell>
          <table:table-cell office:value-type="string" calcext:value-type="string">
            <text:p>Smythe Stonehollow forged this weapon almost two hundred years ago after the Stonehollow clan was forced to flee their ancestral home when it overrun by arachnids from the Underdark. <text:s/>He gathered a band of human- and elven adventurers and tried to drive the creatures back. <text:s/>The attempt was partially successful, but in the end Smythe fell in a battle with the drow behind the invasi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3</text:p>
          </table:table-cell>
          <table:table-cell office:value-type="string" calcext:value-type="string">
            <text:p>Scimitar of the Seven +4</text:p>
          </table:table-cell>
          <table:table-cell office:value-type="string" calcext:value-type="string">
            <text:p>This powerful enchanted scimitar is a bit of an enigma. <text:s/>Its construction suggests a desert culture, but it cannot be traced to any such culture on Abeir-Toril. <text:s/>Divinations reveal it was crafted in honor of seven legendary heroes and wielded by a great queen and a chosen knight destined to slay a great evil, but names and details remain vague at bes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4</text:p>
          </table:table-cell>
          <table:table-cell office:value-type="string" calcext:value-type="string">
            <text:p>Sword of the Planes +1</text:p>
          </table:table-cell>
          <table:table-cell office:value-type="string" calcext:value-type="string">
            <text:p>This used to be a minor enchanted long sword with no remarkable history, but five centuries of exposal to planar energies within the Planar Shere have transformed it into something different. <text:s/>In the presence of certain creatures from other planes it grows in power. <text:s/>And if actually taken into another plane, its power flar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d4a</text:p>
          </table:table-cell>
          <table:table-cell office:value-type="string" calcext:value-type="string">
            <text:p>Sword of the Planes +4</text:p>
          </table:table-cell>
          <table:table-cell office:value-type="string" calcext:value-type="string">
            <text:p>This used to be a minor enchanted long sword with no remarkable history, but five centuries of exposal to planar energies within the Planar Shere have transformed it into something different. <text:s/>Within this Outer Plane it is at maximum power, but it will return to normal if taken back to the Prim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5</text:p>
          </table:table-cell>
          <table:table-cell office:value-type="string" calcext:value-type="string">
            <text:p>Greenswathe +3</text:p>
          </table:table-cell>
          <table:table-cell office:value-type="string" calcext:value-type="string">
            <text:p>This strange, almost alien looking scimitar has rudimentary intelligence and is strictly neutral. <text:s/>It allows only druids to use it, it simply will not function for anyone else. <text:s/>Just grasping it gives the druid a sense there might be more powers to this blade than are currently know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7</text:p>
          </table:table-cell>
          <table:table-cell office:value-type="string" calcext:value-type="string">
            <text:p>Mirthal +1</text:p>
          </table:table-cell>
          <table:table-cell office:value-type="string" calcext:value-type="string">
            <text:p>This graceful longsword is most certainly of elven make. <text:s/>Golden runes in its silvered blade spell out its name, "Mirthal". <text:s/>This blade does not have a long history yet, its first and only known owner was an elven adventurer called Iolrath Farran. He received it as a gift from his parents when he set out on his own, and used it for almost thirty years before trading it in for a better blad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8</text:p>
          </table:table-cell>
          <table:table-cell office:value-type="string" calcext:value-type="string">
            <text:p>Golden Sky +2</text:p>
          </table:table-cell>
          <table:table-cell office:value-type="string" calcext:value-type="string">
            <text:p>This katana has a strange and sometimes conflicting history. <text:s/>Its beginnings are common enough, a shogun in Kara-tur had it commissioned as a reward for a ronin whom had saved his daughter from an evil wu-jen. <text:s/>But what exactly happened afterwards is the stuff of many legend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9</text:p>
          </table:table-cell>
          <table:table-cell office:value-type="string" calcext:value-type="string">
            <text:p>Cold Flame +3</text:p>
          </table:table-cell>
          <table:table-cell office:value-type="string" calcext:value-type="string">
            <text:p>The blade of this magnificent bastard sword was created from a magically treated icicle. <text:s/>It will never melt even in the hottest flame and feels only mildly cold to the touch. <text:s/>Originally created by the ice elementalist Khaldus the Frostmaster almost four centuries ago, Cold Flame has been used by several warriors throughout the years, gradually making its way south from its frozen origin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a</text:p>
          </table:table-cell>
          <table:table-cell office:value-type="string" calcext:value-type="string">
            <text:p>Holy Sword +2</text:p>
          </table:table-cell>
          <table:table-cell office:value-type="string" calcext:value-type="string">
            <text:p>This sacred blade was created by the dwarven smith Brokk in honor of all the good deeds of &lt;CHARNAME&gt; and &lt;PRO_HISHER&gt; friends. <text:s/>As such it has no history, but perhaps this is the beginning of a lege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b</text:p>
          </table:table-cell>
          <table:table-cell office:value-type="string" calcext:value-type="string">
            <text:p>Kanalruil +4</text:p>
          </table:table-cell>
          <table:table-cell office:value-type="string" calcext:value-type="string">
            <text:p>This enchanted blade one belonged to the elven heroine Ytharra, who is said to have slain a great wolf who threatened to devour the sun. <text:s/>Exactly what happned to Ytharra and how her sword came to be in its current location is not know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1</text:p>
          </table:table-cell>
          <table:table-cell office:value-type="string" calcext:value-type="string">
            <text:p>Book of Exalted Deeds</text:p>
          </table:table-cell>
          <table:table-cell office:value-type="string" calcext:value-type="string">
            <text:p>This holy book is sacred to clerics of good alignment. <text:s/>It contains descriptions of the Upper Planes, the proper names of various angels and other powerful beings of good alignment, and sacred rituals to call upon the powers of good. <text:s/>A good cleric who studies this work gains greater insight and wisdom. <text:s/>Evil clerics of course find this book repulsive, while to neutral clerics and members of other classes it bestows no benefi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2</text:p>
          </table:table-cell>
          <table:table-cell office:value-type="string" calcext:value-type="string">
            <text:p>Book of Vile Darkness</text:p>
          </table:table-cell>
          <table:table-cell office:value-type="string" calcext:value-type="string">
            <text:p>This is a work of ineffable evil - meat and drink to priests of that alignment. <text:s/>It contains the true names of many fiends, dark rituals designed to summon them forth in this world, and many other unspeakable things. <text:s/>An evil cleric can risk their life and soul on this to gain greater insight and wisdom. <text:s/>Good clerics of course find the book blasphemous, while to neutral clerics and members of other classes it bestows no benefi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3</text:p>
          </table:table-cell>
          <table:table-cell office:value-type="string" calcext:value-type="string">
            <text:p>Libram of Silver Magic</text:p>
          </table:table-cell>
          <table:table-cell office:value-type="string" calcext:value-type="string">
            <text:p>This book contains an analysis of how magic can be used for the greater good, to bring benefit and prosperity to all. <text:s/>Good wizards can use this to gain greater insight in the workings of the Art. <text:s/>Of course evil wizards scoff at this use of magic, while to neutral wizards and members of other classes the book offers no benefi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4</text:p>
          </table:table-cell>
          <table:table-cell office:value-type="string" calcext:value-type="string">
            <text:p>Libram of Gainful Conjuration</text:p>
          </table:table-cell>
          <table:table-cell office:value-type="string" calcext:value-type="string">
            <text:p>This work contains many arcane secrets, explained in a sober if dry tone. <text:s/>For neutral wizards this can lead to a greater understanding of the Art, but the book is useless to wizards of a good- or evil alignment, and members of all other class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5</text:p>
          </table:table-cell>
          <table:table-cell office:value-type="string" calcext:value-type="string">
            <text:p>Libram of Ineffable Damnation</text:p>
          </table:table-cell>
          <table:table-cell office:value-type="string" calcext:value-type="string">
            <text:p>This book holds many dark and foul secrets of magic that are better left forgotten. <text:s/>Of course evil wizards love such material, and can study it to gain a greater understanding of the Art. <text:s/>Good wizards will have nothing to do with such vileness, while neutral wizards and members of other classes simply find no benefit in i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wand1</text:p>
          </table:table-cell>
          <table:table-cell office:value-type="string" calcext:value-type="string">
            <text:p>Wand of Illusions</text:p>
          </table:table-cell>
          <table:table-cell office:value-type="string" calcext:value-type="string">
            <text:p>This wand is a powerful defensive tool, it can make a wizard invisible, or create illusionary copies of &lt;PRO_HIMHER&g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wand2</text:p>
          </table:table-cell>
          <table:table-cell office:value-type="string" calcext:value-type="string">
            <text:p>Elmira's Wand of Blasting</text:p>
          </table:table-cell>
          <table:table-cell office:value-type="string" calcext:value-type="string">
            <text:p>Elmira the Blue was a necromancer from Cormyr best known for being stark raving mad. <text:s/>However, her faculties were in good enough order to create a number of useful magical items like this wand, which she frequently used whenever another torch-wielding mob attempted to drive her out. Due to her tendency to unleash all manner of undead horrors on the countryside, this happened every tenday or so. <text:s/>Eventually she tried to embrace lichdom but botched the process, killing herself beyond any hope of revival. <text:s/>This wand and several other treasures were recovered half a year later by adventurers brave enough to cleanse her stronghold of her marauding undead creation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wand3</text:p>
          </table:table-cell>
          <table:table-cell office:value-type="string" calcext:value-type="string">
            <text:p>Wand of Earth and Stone</text:p>
          </table:table-cell>
          <table:table-cell office:value-type="string" calcext:value-type="string">
            <text:p>This powerful wand is infused with the element of earth and can summon a lesser earth elemental to do the wielder's bidding. <text:s/>Its secondary function is to cover the wielder in a protective layer of ston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number-rows-repeated="1048421">
          <table:table-cell table:number-columns-repeated="5"/>
          <table:table-cell table:style-name="Default" table:number-columns-repeated="16379"/>
        </table:table-row>
        <table:table-row table:style-name="ro1">
          <table:table-cell table:number-columns-repeated="5"/>
          <table:table-cell table:style-name="Default" table:number-columns-repeated="1637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Liberation Sans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Liberation Sans1" style:font-family-asian="'Liberation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9">00/00/0000</text:date>, <text:time style:data-style-name="N2" text:time-value="23:32:48.70213036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19T23:33:35.640718902</dc:date>
    <meta:editing-duration>PT7M6S</meta:editing-duration>
    <meta:editing-cycles>5</meta:editing-cycles>
    <meta:generator>LibreOffice/25.2.7.2$Linux_X86_64 LibreOffice_project/520$Build-2</meta:generator>
    <meta:document-statistic meta:table-count="1" meta:cell-count="770" meta:object-count="0"/>
  </office:meta>
</office:document-meta>
</file>